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1ce8f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lle Dateien</text:h>
      <text:p text:style-name="Text_20_body">hier der <text:span text:style-name="Strong_20_Emphasis">komplette Inhalt</text:span> aller Module . Stelle sicher, dass <text:span text:style-name="Strong_20_Emphasis">jede</text:span> dieser Dateien existiert:</text:p>
      <text:list text:style-name="L1">
        <text:list-item>
          <text:p text:style-name="P1"><text:span text:style-name="Source_20_Text">bookmark_organisator/__init__.py</text:span> (leer)</text:p>
        </text:list-item>
        <text:list-item>
          <text:p text:style-name="P1"><text:span text:style-name="Source_20_Text">bookmark_organisator/constants.py</text:span> (enthält Farben, Style, V<text:span text:style-name="T1">ersionsnummer</text:span>)</text:p>
        </text:list-item>
        <text:list-item>
          <text:p text:style-name="P1"><text:span text:style-name="Source_20_Text">bookmark_organisator/i18n.py</text:span> (Sprachverwaltung)</text:p>
        </text:list-item>
        <text:list-item>
          <text:p text:style-name="P1"><text:span text:style-name="Source_20_Text">bookmark_organisator/models.py</text:span> (Bookmark-Klasse)</text:p>
        </text:list-item>
        <text:list-item>
          <text:p text:style-name="P1"><text:span text:style-name="Source_20_Text">bookmark_organisator/parsers.py</text:span> (HTML-Parser)</text:p>
        </text:list-item>
        <text:list-item>
          <text:p text:style-name="P1"><text:span text:style-name="Source_20_Text">bookmark_organisator/browser.py</text:span> (Browsererkennung)</text:p>
        </text:list-item>
        <text:list-item>
          <text:p text:style-name="P1"><text:span text:style-name="Source_20_Text">bookmark_organisator/file_handler.py</text:span> (Laden/Speichern)</text:p>
        </text:list-item>
        <text:list-item>
          <text:p text:style-name="P1"><text:span text:style-name="Source_20_Text">bookmark_organisator/widgets/__init__.py</text:span> (leer)</text:p>
        </text:list-item>
        <text:list-item>
          <text:p text:style-name="P1"><text:span text:style-name="Source_20_Text">bookmark_organisator/widgets/cmp_tree.py</text:span> (Drag&amp;Drop-Baum)</text:p>
        </text:list-item>
        <text:list-item>
          <text:p text:style-name="P1"><text:span text:style-name="Source_20_Text">bookmark_organisator/widgets/main_window.py</text:span> (Hauptfenster)</text:p>
        </text:list-item>
        <text:list-item>
          <text:p text:style-name="P1"><text:span text:style-name="Source_20_Text">bookmark_organisator/locales/__init__.py</text:span> (leer)</text:p>
        </text:list-item>
        <text:list-item>
          <text:p text:style-name="P1"><text:span text:style-name="Source_20_Text">bookmark_organisator/locales/de.py</text:span> und <text:span text:style-name="Source_20_Text">en.py</text:span> (Übersetzungen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08:24:59.956954737</meta:creation-date>
    <dc:date>2026-06-26T08:28:45.485719502</dc:date>
    <meta:editing-duration>PT3M45S</meta:editing-duration>
    <meta:editing-cycles>2</meta:editing-cycles>
    <meta:generator>LibreOffice/26.2.3.2$Linux_X86_64 LibreOffice_project/620$Build-2</meta:generator>
    <meta:document-statistic meta:table-count="0" meta:image-count="0" meta:object-count="0" meta:page-count="1" meta:paragraph-count="14" meta:word-count="57" meta:character-count="740" meta:non-whitespace-character-count="709"/>
  </office:meta>
</office:document-meta>
</file>